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Standard">
      <style:text-properties fo:color="#00a933" loext:opacity="100%"/>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text-properties fo:color="#00a933" loext:opacity="100%"/>
    </style:style>
    <style:style style:name="P11" style:family="paragraph" style:parent-style-name="Text_20_body">
      <style:text-properties fo:font-style="italic"/>
    </style:style>
    <style:style style:name="P12" style:family="paragraph" style:parent-style-name="Standard">
      <style:paragraph-properties fo:margin-top="0cm" fo:margin-bottom="0.499cm" style:contextual-spacing="false"/>
      <style:text-properties fo:color="#ffffff" loext:opacity="100%" fo:background-color="#000000"/>
    </style:style>
    <style:style style:name="P13" style:family="paragraph" style:parent-style-name="Preformatted_20_Text">
      <style:text-properties fo:color="#ffffff" loext:opacity="100%" fo:background-color="#000000"/>
    </style:style>
    <style:style style:name="P14" style:family="paragraph" style:parent-style-name="Preformatted_20_Text">
      <style:paragraph-properties fo:margin-top="0cm" fo:margin-bottom="0.499cm" style:contextual-spacing="false"/>
    </style:style>
    <style:style style:name="P15" style:family="paragraph" style:parent-style-name="Heading_20_3">
      <style:text-properties fo:color="#000000" loext:opacity="100%" fo:background-color="#ffffff"/>
    </style:style>
    <style:style style:name="P16" style:family="paragraph" style:parent-style-name="Text_20_body">
      <style:text-properties fo:color="#000000" loext:opacity="100%" fo:background-color="#ffffff"/>
    </style:style>
    <style:style style:name="P17" style:family="paragraph" style:parent-style-name="Standard">
      <style:text-properties fo:color="#ffffff" loext:opacity="100%" fo:background-color="#000000"/>
    </style:style>
    <style:style style:name="P18" style:family="paragraph" style:parent-style-name="Preformatted_20_Text">
      <style:paragraph-properties fo:margin-top="0cm" fo:margin-bottom="0.499cm" style:contextual-spacing="false"/>
      <style:text-properties fo:color="#ffffff" loext:opacity="100%" fo:background-color="#000000"/>
    </style:style>
    <style:style style:name="P19" style:family="paragraph" style:parent-style-name="Text_20_body">
      <style:text-properties fo:color="#000000" loext:opacity="100%" officeooo:paragraph-rsid="00117eea" fo:background-color="#ffffff"/>
    </style:style>
    <style:style style:name="P20" style:family="paragraph" style:parent-style-name="Heading_20_3">
      <style:paragraph-properties fo:margin-top="0cm" fo:margin-bottom="0.247cm" style:contextual-spacing="false" fo:line-height="115%"/>
      <style:text-properties fo:color="#000000" loext:opacity="100%" fo:background-color="#ffffff"/>
    </style:style>
    <style:style style:name="P21" style:family="paragraph" style:parent-style-name="Text_20_body">
      <style:text-properties fo:color="#000000" loext:opacity="100%" fo:background-color="#ffffff"/>
    </style:style>
    <style:style style:name="P22" style:family="paragraph" style:parent-style-name="Text_20_body">
      <style:text-properties fo:color="#00a933" loext:opacity="100%" fo:background-color="#ffffff"/>
    </style:style>
    <style:style style:name="P23" style:family="paragraph" style:parent-style-name="Text_20_body">
      <style:text-properties fo:color="#000000" loext:opacity="100%" officeooo:rsid="00117eea" fo:background-color="#ffffff"/>
    </style:style>
    <style:style style:name="P24" style:family="paragraph" style:parent-style-name="Text_20_body">
      <style:text-properties fo:color="#ffffff" loext:opacity="100%" officeooo:rsid="00117eea" fo:background-color="#000000"/>
    </style:style>
    <style:style style:name="P25" style:family="paragraph" style:parent-style-name="Heading_20_3">
      <style:paragraph-properties fo:margin-top="0cm" fo:margin-bottom="0.247cm" style:contextual-spacing="false" fo:line-height="115%"/>
      <style:text-properties fo:color="#000000" loext:opacity="100%" officeooo:rsid="00117eea" fo:background-color="#ffffff"/>
    </style:style>
    <style:style style:name="P26" style:family="paragraph" style:parent-style-name="Text_20_body" style:list-style-name="L8">
      <style:text-properties fo:color="#ffffff" loext:opacity="100%" officeooo:rsid="00117eea" fo:background-color="#000000"/>
    </style:style>
    <style:style style:name="P27" style:family="paragraph" style:parent-style-name="Text_20_body" style:list-style-name="L8">
      <style:text-properties fo:color="#000000" loext:opacity="100%" officeooo:rsid="00117eea" fo:background-color="#ffffff"/>
    </style:style>
    <style:style style:name="P28" style:family="paragraph" style:parent-style-name="Text_20_body" style:list-style-name="L9">
      <style:text-properties fo:color="#ffffff" loext:opacity="100%" officeooo:rsid="00117eea" fo:background-color="#000000"/>
    </style:style>
    <style:style style:name="P29" style:family="paragraph" style:parent-style-name="Text_20_body" style:list-style-name="L9">
      <style:text-properties fo:color="#000000" loext:opacity="100%" officeooo:rsid="00117eea" fo:background-color="#ffffff"/>
    </style:style>
    <style:style style:name="P30" style:family="paragraph" style:parent-style-name="Text_20_body" style:list-style-name="L9">
      <style:text-properties fo:color="#000000" loext:opacity="100%" fo:font-style="italic" officeooo:rsid="00117eea" fo:background-color="#ffffff"/>
    </style:style>
    <style:style style:name="P31" style:family="paragraph" style:parent-style-name="Text_20_body" style:list-style-name="L10">
      <style:text-properties fo:color="#000000" loext:opacity="100%" officeooo:rsid="00117eea" fo:background-color="#ffffff"/>
    </style:style>
    <style:style style:name="P32" style:family="paragraph" style:parent-style-name="Text_20_body">
      <style:text-properties fo:color="#000000" loext:opacity="100%" officeooo:rsid="00128984" officeooo:paragraph-rsid="00128984" fo:background-color="#ffffff"/>
    </style:style>
    <style:style style:name="P33" style:family="paragraph" style:parent-style-name="Standard">
      <style:text-properties fo:color="#ffffff" loext:opacity="100%" officeooo:rsid="00117eea" fo:background-color="#000000"/>
    </style:style>
    <style:style style:name="P34" style:family="paragraph" style:parent-style-name="Preformatted_20_Text">
      <style:paragraph-properties fo:margin-top="0cm" fo:margin-bottom="0.247cm" style:contextual-spacing="false" fo:line-height="115%"/>
      <style:text-properties fo:color="#000000" loext:opacity="100%" officeooo:rsid="00117eea" fo:background-color="#000000"/>
    </style:style>
    <style:style style:name="P35" style:family="paragraph" style:parent-style-name="Text_20_body">
      <style:text-properties style:use-window-font-color="true" loext:opacity="0%" officeooo:rsid="00128984" officeooo:paragraph-rsid="00128984" fo:background-color="#ffffff"/>
    </style:style>
    <style:style style:name="T1" style:family="text">
      <style:text-properties fo:font-weight="bold"/>
    </style:style>
    <style:style style:name="T2" style:family="text">
      <style:text-properties fo:font-style="italic" fo:font-weight="bold"/>
    </style:style>
    <style:style style:name="T3" style:family="text">
      <style:text-properties fo:font-style="italic"/>
    </style:style>
    <style:style style:name="T4" style:family="text">
      <style:text-properties fo:color="#ffffff" loext:opacity="100%" fo:background-color="#000000" loext:char-shading-value="0"/>
    </style:style>
    <style:style style:name="T5" style:family="text">
      <style:text-properties fo:color="#000000" loext:opacity="100%" fo:background-color="#ffffff" loext:char-shading-value="0"/>
    </style:style>
    <style:style style:name="T6" style:family="text">
      <style:text-properties fo:color="#000080" loext:opacity="100%" fo:background-color="#ffffff" loext:char-shading-value="0"/>
    </style:style>
    <style:style style:name="T7" style:family="text">
      <style:text-properties fo:color="#000000" loext:opacity="100%" fo:font-weight="bold" fo:background-color="#ffffff" loext:char-shading-value="0"/>
    </style:style>
    <style:style style:name="T8" style:family="text">
      <style:text-properties fo:background-color="#ffff00" loext:char-shading-value="0"/>
    </style:style>
    <style:style style:name="T9" style:family="text">
      <style:text-properties fo:color="#ffffff" loext:opacity="10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oute 1: De Automatische Route (Via de Polar Accesslink API)</text:h>
      <text:p text:style-name="Text_20_body">Polar heeft een gratis cloud-API genaamd <text:span text:style-name="T1">Polar Accesslink</text:span>. Aangezien Polar Beat al je sessies automatisch synchroniseert met de cloud (Polar Flow), kun je jouw Next.js WebApp toestemming geven om deze data daar automatisch op te halen.</text:p>
      <text:p text:style-name="P1">Hoe werkt dit in de praktijk op je iPhone?</text:p>
      <text:list text:style-name="L1">
        <text:list-item>
          <text:p text:style-name="P2">Je opent je WebApp op de iPhone en klikt op een knop: <text:span text:style-name="T1">"Koppel met Polar"</text:span>.</text:p>
        </text:list-item>
        <text:list-item>
          <text:p text:style-name="P2">De app stuurt je eenmalig naar de officiële Polar-website waar je inlogt en klikt op "Toestaan" (OAuth2-beveiliging).</text:p>
        </text:list-item>
        <text:list-item>
          <text:p text:style-name="P2">Vanaf dat moment kan jouw WebApp (via een Server Action) met één druk op de knop de nieuwste trainingen binnenhalen.</text:p>
        </text:list-item>
      </text:list>
      <text:p text:style-name="P1">Wat krijg je binnen via de API?</text:p>
      <text:list text:style-name="L2">
        <text:list-item>
          <text:p text:style-name="P3"><text:span text:style-name="T1">Statistieken:</text:span> Gemiddelde hartslag, maximale hartslag, calorieën, duur, starttijd.</text:p>
        </text:list-item>
        <text:list-item>
          <text:p text:style-name="P3"><text:span text:style-name="T1">Hartslagfrequentie (Timeseries):</text:span> Een lijst met hartslagwaarden per seconde of per paar seconden.</text:p>
        </text:list-item>
        <text:list-item>
          <text:p text:style-name="P3"><text:span text:style-name="T1">GPS-route (Samples):</text:span> Een lijst met breedtegraad (latitude), lengtegraad (longitude) en hoogte (elevation) per seconde.</text:p>
        </text:list-item>
      </text:list>
      <text:h text:style-name="Heading_20_3" text:outline-level="3">Route 2: De Handmatige Route (Via GPX/TCX Export)</text:h>
      <text:p text:style-name="Text_20_body">Als je geen zin hebt om een complete API-koppeling te programmeren, kun je gebruikmaken van bestandsexport. Polar Flow (de webversie waar Polar Beat naartoe synchroniseert) laat je trainingen exporteren.</text:p>
      <text:list text:style-name="L3">
        <text:list-item>
          <text:p text:style-name="P4">Je opent op je iPhone (of pc) de website van <text:span text:style-name="T1">Polar Flow</text:span>.</text:p>
        </text:list-item>
        <text:list-item>
          <text:p text:style-name="P4">Je gaat naar de training en klikt op <text:span text:style-name="T1">"Route exporteren" (GPX-bestand)</text:span> of <text:span text:style-name="T1">"Training exporteren" (TCX/CSV-bestand)</text:span>. Dit bestand bevat álle GPS-punten en hartslagen per seconde.</text:p>
        </text:list-item>
        <text:list-item>
          <text:p text:style-name="P4">In je WebApp bouwen we een simpel <text:span text:style-name="T1">File Upload</text:span> veld (net zoals je een foto uploadt).</text:p>
        </text:list-item>
        <text:list-item>
          <text:p text:style-name="P4">Je uploadt het <text:span text:style-name="Source_20_Text">.gpx</text:span> of <text:span text:style-name="Source_20_Text">.tcx</text:span> bestand. Jouw Next.js backend leest dit XML-bestand in een milliseconde uit, filtert de GPS-routes en hartslagen eruit en schiet het in je Turso-database.</text:p>
        </text:list-item>
      </text:list>
      <text:h text:style-name="Heading_20_3" text:outline-level="3">Hoe sla je dit op in je database (Drizzle / Turso)?</text:h>
      <text:p text:style-name="Text_20_body">Om dit voor te bereiden in je database, moeten we de data opsplitsen. Als je per seconde een GPS-locatie en hartslag krijgt, praten we over <text:span text:style-name="T1">honderden tot duizenden regels per sportsessie</text:span>.</text:p>
      <text:p text:style-name="Text_20_body">Je maakt in je <text:span text:style-name="Source_20_Text">schema.ts</text:span> dan twee nieuwe tabellen aan:</text:p>
      <text:list text:style-name="L4">
        <text:list-item>
          <text:p text:style-name="P5"><text:span text:style-name="Source_20_Text"><text:span text:style-name="T1">sessies</text:span></text:span><text:span text:style-name="T1"> (De hoofdgegevens):</text:span></text:p>
          <text:list>
            <text:list-item>
              <text:p text:style-name="P5"><text:span text:style-name="Source_20_Text">id</text:span> (Primary Key)</text:p>
            </text:list-item>
            <text:list-item>
              <text:p text:style-name="P5"><text:span text:style-name="Source_20_Text">locatieId</text:span> (Optioneel, om te koppelen aan je huidige locaties)</text:p>
            </text:list-item>
            <text:list-item>
              <text:p text:style-name="P5"><text:soft-page-break/><text:span text:style-name="Source_20_Text">startTijd</text:span> (DateTime)</text:p>
            </text:list-item>
            <text:list-item>
              <text:p text:style-name="P5"><text:span text:style-name="Source_20_Text">duurInSeconden</text:span> (Integer)</text:p>
            </text:list-item>
            <text:list-item>
              <text:p text:style-name="P5"><text:span text:style-name="Source_20_Text">gemiddeldeHartslag</text:span> (Integer)</text:p>
            </text:list-item>
          </text:list>
        </text:list-item>
        <text:list-item>
          <text:p text:style-name="P5"><text:span text:style-name="Source_20_Text"><text:span text:style-name="T1">sessie_metingen</text:span></text:span><text:span text:style-name="T1"> (De gedetailleerde seconden-data voor je PC-analyse):</text:span></text:p>
          <text:list>
            <text:list-item>
              <text:p text:style-name="P5"><text:span text:style-name="Source_20_Text">id</text:span> (Primary Key)</text:p>
            </text:list-item>
            <text:list-item>
              <text:p text:style-name="P5"><text:span text:style-name="Source_20_Text">sessieId</text:span> (Foreign Key naar de sessie)</text:p>
            </text:list-item>
            <text:list-item>
              <text:p text:style-name="P5"><text:span text:style-name="Source_20_Text">tijdstip</text:span> (Aantal seconden sinds de start)</text:p>
            </text:list-item>
            <text:list-item>
              <text:p text:style-name="P5"><text:span text:style-name="Source_20_Text">hartslag</text:span> (Integer)</text:p>
            </text:list-item>
            <text:list-item>
              <text:p text:style-name="P5"><text:span text:style-name="Source_20_Text">latitude</text:span> (Real/Float voor GPS)</text:p>
            </text:list-item>
            <text:list-item>
              <text:p text:style-name="P5"><text:span text:style-name="Source_20_Text">longitude</text:span> (Real/Float voor GPS)</text:p>
            </text:list-item>
          </text:list>
        </text:list-item>
      </text:list>
      <text:h text:style-name="Heading_20_3" text:outline-level="3">Conclusie &amp; Advies</text:h>
      <text:p text:style-name="Text_20_body">Het is technisch absoluut mogelijk en een waanzinnig gave uitbreiding van je dashboard!</text:p>
      <text:list text:style-name="L5">
        <text:list-item>
          <text:p text:style-name="P6"><text:span text:style-name="T1">Wil je snel resultaat?</text:span> Ga dan voor <text:span text:style-name="T1">Route 2 (GPX-upload)</text:span>. Het bouwen van een GPX-uploader in Next.js kost je een avondje werk en je kunt direct data analyseren op je pc.</text:p>
        </text:list-item>
        <text:list-item>
          <text:p text:style-name="P6"><text:span text:style-name="T1">Wil je ultiem comfort?</text:span> Ga dan later voor <text:span text:style-name="T1">Route 1 (Polar API)</text:span>, zodat je na het hardlopen of fietsen alleen maar op "Synchroniseer Polar" hoeft te tikken in je app.</text:p>
        </text:list-item>
      </text:list>
      <text:p text:style-name="P7">Route 1 lijkt me de aangewezen weg. Is het verstandig om dit in een aparte WebApp op te pakken?</text:p>
      <text:p text:style-name="Standard"/>
      <text:p text:style-name="Standard"/>
      <text:p text:style-name="Text_20_body">Het is een heel goed strategisch besluit om voor <text:span text:style-name="T1">Route 1 (de Polar Accesslink API)</text:span> te kiezen. Dat levert op de lange termijn veruit de meest naadloze gebruikerservaring op: sporten met je horloge of iPhone, en met één druk op de knop staat alles in je dashboard.</text:p>
      <text:p text:style-name="Text_20_body">Op de vraag of je dit in een <text:span text:style-name="T1">aparte WebApp</text:span> moet oppakken, is het korte antwoord vanuit software-architectuur: <text:span text:style-name="T1">Nee, het is juist heel verstandig om dit </text:span><text:span text:style-name="T2">binnen je huidige WebApp</text:span><text:span text:style-name="T1"> (Observatie-app-v2) te integreren.</text:span></text:p>
      <text:p text:style-name="Text_20_body">Hier is de afweging waarom integreren in de huidige app beter is, en hoe je dit heel clean kunt scheiden zodat je code overzichtelijk blijft.</text:p>
      <text:h text:style-name="Heading_20_3" text:outline-level="3">Waarom integreren in de huidige WebApp?</text:h>
      <text:list text:style-name="L6">
        <text:list-item>
          <text:p text:style-name="P8"><text:span text:style-name="T1">Gedeelde Database &amp; Data-analyse:</text:span> De belangrijkste reden waarom je dit doet is de "nadere analyse op de PC". Als de Polar-data in dezelfde Turso-database landt als je handmatige observaties, kun je heel krachtige dwarsverbanden leggen. Je kunt dan bijvoorbeeld de hartslagfrequentie of de gelopen GPS-route direct plotten <text:span text:style-name="T3">naast</text:span> de omgevingsfactoren (zoals de temperatuur of luchtvochtigheid) die je op die locaties handmatig hebt ingevoerd.</text:p>
        </text:list-item>
        <text:list-item>
          <text:p text:style-name="P8"><text:span text:style-name="T1">Hergebruik van componenten en infrastructuur:</text:span> Je hebt nu al een werkende Next.js-applicatie met Drizzle ORM, een Turso-koppeling, Tailwind CSS voor de styling en een <text:soft-page-break/>fijne interface. Als je een aparte WebApp maakt, moet je al die configuratie (omgeving variabelen, database connecties, authenticatie, deployment) weer helemaal opnieuw opzetten en onderhouden.</text:p>
        </text:list-item>
        <text:list-item>
          <text:p text:style-name="P8"><text:span text:style-name="T1">Eén dashboard voor alles:</text:span> Voor de pc-analyse wil je waarschijnlijk gewoon één centraal dashboard openen waar je kunt schakelen tussen "Handmatige Waarnemingen" en "Polar Sportsessies", in plaats van dat je naar twee verschillende websites moet surfen.</text:p>
        </text:list-item>
      </text:list>
      <text:h text:style-name="Heading_20_3" text:outline-level="3">Hoe pak je dit aan zonder dat je huidige code een rommeltje wordt?</text:h>
      <text:p text:style-name="Text_20_body">Om te zorgen dat je dashboard niet overprikkeld raakt met code die alleen voor Polar bedoeld is, kun je in Next.js gebruikmaken van <text:span text:style-name="T1">modulaire mappen</text:span>. Zo blijft de Polar-functionaliteit volledig geïsoleerd totdat je het nodig hebt.</text:p>
      <text:p text:style-name="Text_20_body">Je kunt de structuur als volgt inrichten:</text:p>
      <text:list text:style-name="L7">
        <text:list-item>
          <text:p text:style-name="P9"><text:span text:style-name="T1">Database-isolatie (</text:span><text:span text:style-name="Source_20_Text"><text:span text:style-name="T1">schema.ts</text:span></text:span><text:span text:style-name="T1">):</text:span> Voeg de nieuwe tabellen <text:span text:style-name="Source_20_Text">sessies</text:span> en <text:span text:style-name="Source_20_Text">sessieMetingen</text:span> onderaan toe aan je huidige <text:span text:style-name="Source_20_Text">schema.ts</text:span>. Ze staan daar prima en zitten je huidige tabellen (<text:span text:style-name="Source_20_Text">locaties</text:span>, <text:span text:style-name="Source_20_Text">kenmerken</text:span>, <text:span text:style-name="Source_20_Text">observaties</text:span>) totaal niet in de weg.</text:p>
        </text:list-item>
        <text:list-item>
          <text:p text:style-name="P9"><text:span text:style-name="T1">Een apart API-bestand (</text:span><text:span text:style-name="Source_20_Text"><text:span text:style-name="T1">app/polarActions.ts</text:span></text:span><text:span text:style-name="T1">):</text:span> Maak een nieuw, los bestand aan naast je huidige <text:span text:style-name="Source_20_Text">actions.ts</text:span>. Noem dit bijvoorbeeld <text:span text:style-name="Source_20_Text">polarActions.ts</text:span>. Hierin schrijf je alle specifieke functies voor de Polar API (zoals het ophalen van de OAuth2-token en het binnenhalen van de hartslag-timeseries). Je huidige <text:span text:style-name="Source_20_Text">actions.ts</text:span> blijft hierdoor lekker schoon.</text:p>
        </text:list-item>
        <text:list-item>
          <text:p text:style-name="P9"><text:span text:style-name="T1">Een aparte pagina in de UI (</text:span><text:span text:style-name="Source_20_Text"><text:span text:style-name="T1">app/polar/page.tsx</text:span></text:span><text:span text:style-name="T1">):</text:span> In plaats van het formulier op je huidige dashboard te proppen, kun je in Next.js heel makkelijk een extra route maken. Door een map <text:span text:style-name="Source_20_Text">app/polar/</text:span> aan te maken met daarin een <text:span text:style-name="Source_20_Text">page.tsx</text:span>, creëer je een volledig schone, aparte pagina.</text:p>
          <text:list>
            <text:list-item>
              <text:p text:style-name="P9">Op je hoofd-dashboard zet je simpelweg een knop: <text:span text:style-name="T1">"🏃‍♂️ Naar Polar Synchronisatie"</text:span>.</text:p>
            </text:list-item>
            <text:list-item>
              <text:p text:style-name="P9">Als je daarop klikt, kom je op een pagina die puur en alleen bedoeld is voor het koppelen met Polar en het inladen van je trainingen.</text:p>
            </text:list-item>
          </text:list>
        </text:list-item>
      </text:list>
      <text:h text:style-name="Heading_20_3" text:outline-level="3">Conclusie</text:h>
      <text:p text:style-name="Text_20_body">Het voelt misschien als een groot nieuw project, maar door het <text:span text:style-name="T1">binnen dezelfde applicatie</text:span> te bouwen op een <text:span text:style-name="T1">geïsoleerde pagina</text:span>, bespaar je jezelf heel veel database- en hosting-hoofdpijn. Je houdt alles onder één dak, bouwt voort op de stabiele basis die er nu ligt, en kunt straks op je pc de ultieme gecombineerde data-analyse doen!</text:p>
      <text:p text:style-name="P10">Omdat aparte pagina's mogelijk zijn en specifieke code goed geïsoleerd kan worden lijkt me jouw conclusie met deze argumenten de aangewezen route. </text:p>
      <text:p text:style-name="P10">Gaan we stap voor stap oppakken wat mij betreft. </text:p>
      <text:p text:style-name="Text_20_body">Geweldig! Stap voor stap is ook echt de beste manier om dit aan te pakken. Omdat de Polar Accesslink API met een zogenaamde OAuth2-koppeling werkt (veilig inloggen bij Polar om je app toestemming te geven), is het belangrijk om eerst de fundering te leggen.</text:p>
      <text:p text:style-name="Text_20_body"><text:soft-page-break/>We gaan starten met <text:span text:style-name="T1">Stap 1: De database-tabellen gereedmaken in </text:span><text:span text:style-name="Source_20_Text"><text:span text:style-name="T1">schema.ts</text:span></text:span>.</text:p>
      <text:p text:style-name="Text_20_body">We gaan twee nieuwe tabellen toevoegen aan je huidige database-schema. De eerste tabel slaat de hoofdinformatie van een sportsessie op (datum, duur, calorieën, gemiddelde hartslag). De tweede tabel gaat de enorme berg gedetailleerde seconden-data (hartslag per seconde + GPS-coördinaten) opvangen. Omdat een sessie duizenden seconden kan duren, koppelen we deze records via een <text:span text:style-name="T3">foreign key</text:span> netjes aan de hoofdsessie.</text:p>
      <text:h text:style-name="Heading_20_3" text:outline-level="3">Deel 1: Pas <text:span text:style-name="Source_20_Text">app/db/schema.ts</text:span> aan (of waar je Drizzle schema staat)</text:h>
      <text:p text:style-name="Text_20_body">Open je schema-bestand en voeg onderaan (onder je huidige tabellen) de volgende code toe.</text:p>
      <text:p text:style-name="Text_20_body"><text:span text:style-name="T3">(Zorg ervoor dat </text:span><text:span text:style-name="Source_20_Text"><text:span text:style-name="T3">text</text:span></text:span><text:span text:style-name="T3">, </text:span><text:span text:style-name="Source_20_Text"><text:span text:style-name="T3">integer</text:span></text:span><text:span text:style-name="T3">, </text:span><text:span text:style-name="Source_20_Text"><text:span text:style-name="T3">real</text:span></text:span><text:span text:style-name="T3"> en </text:span><text:span text:style-name="Source_20_Text"><text:span text:style-name="T3">sqliteTable</text:span></text:span><text:span text:style-name="T3"> indien nodig bovenaan het bestand worden geïmporteerd uit </text:span><text:span text:style-name="Source_20_Text"><text:span text:style-name="T3">drizzle-orm/sqlite-core</text:span></text:span><text:span text:style-name="T3">).</text:span></text:p>
      <text:p text:style-name="P11"/>
      <text:p text:style-name="P12">TypeScript</text:p>
      <text:p text:style-name="Preformatted_20_Text"><text:span text:style-name="Source_20_Text"><text:span text:style-name="T4">import { sqliteTable, text, integer, real } from 'drizzle-orm/sqlite-core';</text:span></text:span></text:p>
      <text:p text:style-name="P13"/>
      <text:p text:style-name="Preformatted_20_Text"><text:span text:style-name="Source_20_Text"><text:span text:style-name="T4">// 1. Hoofdtabel voor de sportsessies (Polar)</text:span></text:span></text:p>
      <text:p text:style-name="Preformatted_20_Text"><text:span text:style-name="Source_20_Text"><text:span text:style-name="T4">export const sportSessies = sqliteTable('sport_sessies', {</text:span></text:span></text:p>
      <text:p text:style-name="Preformatted_20_Text"><text:span text:style-name="Source_20_Text"><text:span text:style-name="T4"><text:s text:c="4"/>id: text('id').primaryKey(), // We gebruiken hier straks de unieke 'transaction-id' of 'exercise-id' van Polar zelf</text:span></text:span></text:p>
      <text:p text:style-name="Preformatted_20_Text"><text:span text:style-name="Source_20_Text"><text:span text:style-name="T4"><text:s text:c="4"/>startTijd: text('start_tijd').notNull(), // ISO string van de start van je training</text:span></text:span></text:p>
      <text:p text:style-name="Preformatted_20_Text"><text:span text:style-name="Source_20_Text"><text:span text:style-name="T4"><text:s text:c="4"/>duur: integer('duur').notNull(), // Duur in seconden</text:span></text:span></text:p>
      <text:p text:style-name="Preformatted_20_Text"><text:span text:style-name="Source_20_Text"><text:span text:style-name="T4"><text:s text:c="4"/>calorieen: integer('calorieen'),</text:span></text:span></text:p>
      <text:p text:style-name="Preformatted_20_Text"><text:span text:style-name="Source_20_Text"><text:span text:style-name="T4"><text:s text:c="4"/>gemiddeldeHartslag: integer('gemiddelde_hartslag'),</text:span></text:span></text:p>
      <text:p text:style-name="Preformatted_20_Text"><text:span text:style-name="Source_20_Text"><text:span text:style-name="T4"><text:s text:c="4"/>maximaleHartslag: integer('maximale_hartslag'),</text:span></text:span></text:p>
      <text:p text:style-name="Preformatted_20_Text"><text:span text:style-name="Source_20_Text"><text:span text:style-name="T4"><text:s text:c="4"/>sportType: text('sport_type'), // Bijv. 'RUNNING', 'CYCLING'</text:span></text:span></text:p>
      <text:p text:style-name="Preformatted_20_Text"><text:span text:style-name="Source_20_Text"><text:span text:style-name="T4"><text:s text:c="4"/>createdAt: text('created_at').default(new Date().toISOString()),</text:span></text:span></text:p>
      <text:p text:style-name="Preformatted_20_Text"><text:span text:style-name="Source_20_Text"><text:span text:style-name="T4">});</text:span></text:span></text:p>
      <text:p text:style-name="P13"/>
      <text:p text:style-name="Preformatted_20_Text"><text:span text:style-name="Source_20_Text"><text:span text:style-name="T4">// 2. Detailtabel voor de seconden-data (Hartslag &amp; GPS)</text:span></text:span></text:p>
      <text:p text:style-name="Preformatted_20_Text"><text:span text:style-name="Source_20_Text"><text:span text:style-name="T4">export const sportSessieMetingen = sqliteTable('sport_sessie_metingen', {</text:span></text:span></text:p>
      <text:p text:style-name="Preformatted_20_Text"><text:span text:style-name="Source_20_Text"><text:span text:style-name="T4"><text:s text:c="4"/>id: integer('id').primaryKey({ autoIncrement: true }),</text:span></text:span></text:p>
      <text:p text:style-name="Preformatted_20_Text"><text:span text:style-name="Source_20_Text"><text:span text:style-name="T4"><text:s text:c="4"/>sessieId: text('sessie_id')</text:span></text:span></text:p>
      <text:p text:style-name="Preformatted_20_Text"><text:span text:style-name="Source_20_Text"><text:span text:style-name="T4"><text:s text:c="8"/>.notNull()</text:span></text:span></text:p>
      <text:p text:style-name="Preformatted_20_Text"><text:span text:style-name="Source_20_Text"><text:span text:style-name="T4"><text:s text:c="8"/>.references(() =&gt; sportSessies.id, { onDelete: 'cascade' }), // Als een sessie wordt gewist, gaan alle metingen mee</text:span></text:span></text:p>
      <text:p text:style-name="Preformatted_20_Text"><text:span text:style-name="Source_20_Text"><text:span text:style-name="T4"><text:s text:c="4"/>tijdVerschuiving: integer('tijd_verschuiving').notNull(), // Aantal seconden sinds de start van de sessie</text:span></text:span></text:p>
      <text:p text:style-name="Preformatted_20_Text"><text:span text:style-name="Source_20_Text"><text:span text:style-name="T4"><text:s text:c="4"/>hartslag: integer('hartslag'), // Hartslag op dit specifieke moment</text:span></text:span></text:p>
      <text:p text:style-name="Preformatted_20_Text"><text:span text:style-name="Source_20_Text"><text:span text:style-name="T4"><text:s text:c="4"/>latitude: real('latitude'), // GPS Breedtegraad (indien beschikbaar)</text:span></text:span></text:p>
      <text:p text:style-name="Preformatted_20_Text"><text:span text:style-name="Source_20_Text"><text:span text:style-name="T4"><text:s text:c="4"/>longitude: real('longitude'), // GPS Lengtegraad (indien beschikbaar)</text:span></text:span></text:p>
      <text:p text:style-name="Preformatted_20_Text"><text:span text:style-name="Source_20_Text"><text:span text:style-name="T4"><text:s text:c="4"/>hoogte: real('hoogte'), // Hoogte in meters (indien beschikbaar)</text:span></text:span></text:p>
      <text:p text:style-name="P14"><text:span text:style-name="Source_20_Text"><text:span text:style-name="T4">});</text:span></text:span></text:p>
      <text:h text:style-name="P15" text:outline-level="3">Deel 2: De database bijwerken in Turso</text:h>
      <text:p text:style-name="P16">Zodra je dit bestand hebt opgeslagen, moeten we Turso vertellen dat deze tabellen aangemaakt moeten worden. Omdat we met Drizzle Kit werken, kun je dit heel eenvoudig via je terminal naar de cloud pushen.</text:p>
      <text:p text:style-name="P16">Run het volgende commando in je project-terminal:</text:p>
      <text:p text:style-name="P17"><text:soft-page-break/>Bash</text:p>
      <text:p text:style-name="P18"><text:span text:style-name="Source_20_Text">npx drizzle-kit push</text:span></text:p>
      <text:p text:style-name="P19"><text:span text:style-name="Source_20_Text">Drizzle zal je schema vergelijken met je Turso database en de twee nieuwe tabellen direct en veilig aanmaken zonder je bestaande data (locaties en observaties) aan te raken.</text:span></text:p>
      <text:h text:style-name="P20" text:outline-level="3">Volgende stap?</text:h>
      <text:p text:style-name="P21">Als de tabellen succesvol naar Turso zijn gepusht, staat onze database klaar om de Polar-data te ontvangen!</text:p>
      <text:p text:style-name="P21">Laat me weten of de <text:span text:style-name="Source_20_Text">drizzle-kit push</text:span> vlekkeloos is verlopen. Als dat zo is, gaan we door naar <text:span text:style-name="T1">Stap 2: Een Polar Developer Account aanmaken</text:span> en de benodigde Client ID en Client Secret sleutels ophalen die we in ons project moeten zetten om tegen Polar te mogen praten.</text:p>
      <text:p text:style-name="P22">stap 1 is oké</text:p>
      <text:p text:style-name="P23">Wat fantastisch dat de database-migratie via Drizzle soepel is verlopen! De fundering in Turso staat nu stevig op zijn plek.</text:p>
      <text:p text:style-name="P23">Nu gaan we door naar <text:span text:style-name="T1">Stap 2: De app registreren bij Polar</text:span>.</text:p>
      <text:p text:style-name="P24"><text:span text:style-name="T5">Om ervoor te zorgen dat jouw WebApp straks veilig contact mag leggen met de Polar-servers, moeten we een digitaal paspoort aanvragen. Dit levert ons een </text:span><text:span text:style-name="Source_20_Text"><text:span text:style-name="T5">Client ID</text:span></text:span><text:span text:style-name="T5"> en een </text:span><text:span text:style-name="Source_20_Text"><text:span text:style-name="T5">Client Secret</text:span></text:span><text:span text:style-name="T5"> op. Polar gebruikt dit om te controleren wie de gegevens opvraagt.</text:span></text:p>
      <text:p text:style-name="P23">Volg deze stappen om de sleutels te bemachtigen:</text:p>
      <text:h text:style-name="P25" text:outline-level="3">1. Account aanmaken bij Polar Developer</text:h>
      <text:list text:style-name="L8">
        <text:list-item>
          <text:p text:style-name="P26"><text:span text:style-name="T5">Ga in je browser naar het </text:span><text:a xlink:type="simple" xlink:href="https://www.google.com/search?q=https://requests.polar.com/" office:target-frame-name="_blank" xlink:show="new" text:style-name="Internet_20_link" text:visited-style-name="Visited_20_Internet_20_Link"><text:span text:style-name="T6">Polar Developer Portal</text:span></text:a><text:span text:style-name="T5"> (of zoek naar "Polar Accesslink Developer").</text:span></text:p>
        </text:list-item>
        <text:list-item>
          <text:p text:style-name="P27">Log in met je bestaande Polar-account (dezelfde logingegevens die je gebruikt voor de Polar Beat of Polar Flow app). If je nog geen developer profiel hebt, vraagt Polar je eenmalig om akkoord te gaan met de voorwaarden.</text:p>
        </text:list-item>
      </text:list>
      <text:h text:style-name="P25" text:outline-level="3">2. Een nieuwe applicatie registreren</text:h>
      <text:p text:style-name="P23">Zodra je bent ingelogd, zie je een knop zoals <text:span text:style-name="T1">"Register Application"</text:span> of <text:span text:style-name="T1">"Create New App"</text:span>. Klik hierop en vul de velden als volgt in:</text:p>
      <text:list text:style-name="L9">
        <text:list-item>
          <text:p text:style-name="P28"><text:span text:style-name="T7">Application Name:</text:span><text:span text:style-name="T5"> Bijvoorbeeld </text:span><text:span text:style-name="Source_20_Text"><text:span text:style-name="T5">Mijn Observatie Dashboard</text:span></text:span><text:span text:style-name="T5"> of </text:span><text:span text:style-name="Source_20_Text"><text:span text:style-name="T5">GezondheidsAnalyse App</text:span></text:span><text:span text:style-name="T5">.</text:span></text:p>
        </text:list-item>
        <text:list-item>
          <text:p text:style-name="P29"><text:span text:style-name="T1">Description:</text:span> Een korte omschrijving, bijvoorbeeld: <text:span text:style-name="T3">Dashboard voor het analyseren van eigen sport- en omgevingsgegevens.</text:span></text:p>
        </text:list-item>
        <text:list-item>
          <text:p text:style-name="P29"><text:span text:style-name="T1">Organization / Developer:</text:span> Je eigen naam.</text:p>
        </text:list-item>
        <text:list-item>
          <text:p text:style-name="P29"><text:span text:style-name="T1">Authorization Redirect URL (CRUCIAL):</text:span> Dit is het webadres waar Polar de gebruiker (jou dus) naartoe terugstuurt <text:span text:style-name="T3">nadat</text:span> er succesvol is ingelogd op de iPhone.</text:p>
          <text:list>
            <text:list-item>
              <text:p text:style-name="P28"><text:soft-page-break/><text:span text:style-name="T5">Omdat we nu lokaal aan het ontwikkelen zijn, vul je hier exact dit in: </text:span><text:span text:style-name="Source_20_Text"><text:span text:style-name="T5">http://localhost:3000/api/polar/callback</text:span></text:span></text:p>
            </text:list-item>
            <text:list-item>
              <text:p text:style-name="P30">(Geen zorgen: als je app later live op internet komt te staan, kun je dit adres in de Polar-console heel makkelijk aanpassen naar je echte domeinnaam).</text:p>
            </text:list-item>
          </text:list>
        </text:list-item>
      </text:list>
      <text:h text:style-name="P25" text:outline-level="3">3. De sleutels opslaan in je project</text:h>
      <text:p text:style-name="P23">Als je de registratie opslaat, genereert Polar direct twee unieke codes voor je applicatie:</text:p>
      <text:list text:style-name="L10">
        <text:list-item>
          <text:p text:style-name="P31"><text:span text:style-name="T1">Client ID</text:span> (een reeks letters en cijfers)</text:p>
        </text:list-item>
        <text:list-item>
          <text:p text:style-name="P31"><text:span text:style-name="T1">Client Secret</text:span> (een lange geheime sleutel)</text:p>
        </text:list-item>
      </text:list>
      <text:p text:style-name="P24"><text:span text:style-name="T5">Open nu je lokale code-editor en open je </text:span><text:span text:style-name="Source_20_Text"><text:span text:style-name="T5">.env.local</text:span></text:span><text:span text:style-name="T5"> bestand (in de root van je Next.js project). Voeg daar deze twee regels onderaan toe en plak je net verkregen sleutels erachter:</text:span></text:p>
      <text:p text:style-name="P32"><text:span text:style-name="T8">Ik heb ingelogd op: </text:span><text:a xlink:type="simple" xlink:href="https://admin.polaraccesslink.com/" text:style-name="Internet_20_link" text:visited-style-name="Visited_20_Internet_20_Link"><text:span text:style-name="T8">https://admin.polaraccesslink.com</text:span></text:a><text:span text:style-name="T8"> en daar nieuwe link aangemaakt: “</text:span></text:p>
      <text:p text:style-name="P33">Codefragment</text:p>
      <text:p text:style-name="P34"><text:span text:style-name="Source_20_Text"><text:span text:style-name="T9">POLAR_CLIENT_ID="HIER_JE_POLAR_CLIENT_ID_PLAKKEN"</text:span></text:span></text:p>
      <text:p text:style-name="P34"><text:span text:style-name="Source_20_Text"><text:span text:style-name="T9">POLAR_CLIENT_SECRET="HIER_JE_POLAR_CLIENT_SECRET_PLAKKEN"</text:span></text:span></text:p>
      <text:p text:style-name="P34"><text:span text:style-name="Source_20_Text"><text:span text:style-name="T9">POLAR_REDIRECT_URI="http://localhost:3000/api/api/polar/callback"</text:span></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23:45:33.160276700</meta:creation-date>
    <dc:date>2026-06-03T00:27:04.457953000</dc:date>
    <meta:editing-duration>PT30M39S</meta:editing-duration>
    <meta:editing-cycles>1</meta:editing-cycles>
    <meta:document-statistic meta:table-count="0" meta:image-count="0" meta:object-count="0" meta:page-count="6" meta:paragraph-count="122" meta:word-count="1878" meta:character-count="12379" meta:non-whitespace-character-count="10588"/>
    <meta:generator>LibreOffice/25.8.6.2$Windows_X86_64 LibreOffice_project/b4b39682cd9868fa725bc664aff94278d315bd04</meta:generator>
  </office:meta>
</office:document-meta>
</file>